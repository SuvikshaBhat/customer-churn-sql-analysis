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Key Findings<text:line-break/><text:line-break/>1. Overall churn rate is 20.37%.<text:line-break/><text:line-break/>2. Germany has the highest churn rate.<text:line-break/><text:line-break/>3. Inactive members churn significantly more.<text:line-break/><text:line-break/>4. Customers with only one product have the highest churn.<text:line-break/><text:line-break/>5. Higher balance customers are more likely to churn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6-15T13:05:46.497000000</dc:date>
    <meta:editing-duration>PT13S</meta:editing-duration>
    <meta:editing-cycles>1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1" meta:word-count="41" meta:character-count="251" meta:non-whitespace-character-count="205"/>
  </office:meta>
</office:document-meta>
</file>